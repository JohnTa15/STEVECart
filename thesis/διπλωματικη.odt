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274551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Arial" officeooo:rsid="0005a6a0" officeooo:paragraph-rsid="0005a6a0"/>
    </style:style>
    <style:style style:name="P2" style:family="paragraph" style:parent-style-name="Standard">
      <style:paragraph-properties fo:text-align="center" style:justify-single-word="false"/>
      <style:text-properties style:font-name="Arial" officeooo:rsid="0005a6a0" officeooo:paragraph-rsid="0005a6a0"/>
    </style:style>
    <style:style style:name="P3" style:family="paragraph" style:parent-style-name="Header">
      <style:paragraph-properties fo:text-align="center" style:justify-single-word="false"/>
      <style:text-properties officeooo:rsid="0005c2ca" officeooo:paragraph-rsid="0015f48e"/>
    </style:style>
    <style:style style:name="P4" style:family="paragraph" style:parent-style-name="Header">
      <style:paragraph-properties fo:text-align="center" style:justify-single-word="false"/>
      <style:text-properties officeooo:rsid="0005c2ca" officeooo:paragraph-rsid="0021c943"/>
    </style:style>
    <style:style style:name="P5" style:family="paragraph" style:parent-style-name="Header">
      <style:paragraph-properties fo:text-align="center" style:justify-single-word="false"/>
      <style:text-properties officeooo:paragraph-rsid="0021c943"/>
    </style:style>
    <style:style style:name="P6" style:family="paragraph" style:parent-style-name="Heading_20_1">
      <style:paragraph-properties fo:margin-top="0in" fo:margin-bottom="0in" style:contextual-spacing="false" fo:text-align="start" style:justify-single-word="false"/>
    </style:style>
    <style:style style:name="P7" style:family="paragraph" style:parent-style-name="Header">
      <style:paragraph-properties fo:text-align="center" style:justify-single-word="false" fo:break-before="page"/>
      <style:text-properties officeooo:rsid="0005c2ca" officeooo:paragraph-rsid="0015f48e"/>
    </style:style>
    <style:style style:name="P8" style:family="paragraph" style:parent-style-name="Heading_20_1">
      <style:paragraph-properties fo:text-align="start" style:justify-single-word="false"/>
    </style:style>
    <style:style style:name="P9" style:family="paragraph" style:parent-style-name="Text_20_body">
      <style:paragraph-properties fo:text-align="center" style:justify-single-word="false"/>
      <style:text-properties officeooo:paragraph-rsid="001df54e"/>
    </style:style>
    <style:style style:name="P10" style:family="paragraph" style:parent-style-name="Text_20_body">
      <style:paragraph-properties fo:text-align="center" style:justify-single-word="false"/>
      <style:text-properties style:font-name="Arial" fo:font-size="14pt" officeooo:rsid="0005c2ca" officeooo:paragraph-rsid="0005c2ca" style:font-size-asian="14pt" style:font-size-complex="14pt"/>
    </style:style>
    <style:style style:name="P11" style:family="paragraph" style:parent-style-name="Heading_20_1">
      <style:paragraph-properties fo:text-align="center" style:justify-single-word="false" fo:break-before="page"/>
      <style:text-properties officeooo:paragraph-rsid="001db6d4"/>
    </style:style>
    <style:style style:name="P12" style:family="paragraph" style:parent-style-name="Standard">
      <style:paragraph-properties fo:text-align="center" style:justify-single-word="false"/>
      <style:text-properties style:font-name="Arial" officeooo:rsid="0005a6a0" officeooo:paragraph-rsid="0005c2ca"/>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ff0000" loext:opacity="100%"/>
    </style:style>
    <style:style style:name="P15" style:family="paragraph" style:parent-style-name="Standard">
      <style:paragraph-properties fo:text-align="center" style:justify-single-word="false" fo:break-before="page"/>
      <style:text-properties fo:color="#c9211e" loext:opacity="100%" style:font-name="Arial" fo:font-weight="bold" officeooo:rsid="00072fbc" officeooo:paragraph-rsid="00072fbc" style:font-weight-asian="bold" style:font-weight-complex="bold"/>
    </style:style>
    <style:style style:name="P16" style:family="paragraph" style:parent-style-name="Heading_20_1">
      <style:paragraph-properties fo:text-align="center" style:justify-single-word="false"/>
      <style:text-properties fo:font-style="normal" style:font-style-asian="normal" style:font-style-complex="normal"/>
    </style:style>
    <style:style style:name="P17" style:family="paragraph" style:parent-style-name="Heading_20_1">
      <style:paragraph-properties fo:text-align="center" style:justify-single-word="false" fo:break-before="page"/>
    </style:style>
    <style:style style:name="P18" style:family="paragraph" style:parent-style-name="Text_20_body">
      <style:paragraph-properties fo:text-align="justify"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Horizontal_20_Line">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text-properties officeooo:paragraph-rsid="0021c943"/>
    </style:style>
    <style:style style:name="P23" style:family="paragraph" style:parent-style-name="Heading_20_1">
      <style:text-properties officeooo:rsid="002b2149" officeooo:paragraph-rsid="002b2149"/>
    </style:style>
    <style:style style:name="P24" style:family="paragraph" style:parent-style-name="Text_20_body">
      <style:text-properties fo:font-weight="bold" officeooo:rsid="002b2149" officeooo:paragraph-rsid="002b2149" style:font-weight-asian="bold" style:font-weight-complex="bold"/>
    </style:style>
    <style:style style:name="P25" style:family="paragraph" style:parent-style-name="Text_20_body">
      <style:text-properties fo:font-weight="normal" officeooo:rsid="002b2149" officeooo:paragraph-rsid="002b214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officeooo:rsid="0010ba57"/>
    </style:style>
    <style:style style:name="T4" style:family="text">
      <style:text-properties officeooo:rsid="0014361b"/>
    </style:style>
    <style:style style:name="T5" style:family="text">
      <style:text-properties officeooo:rsid="00146e6c"/>
    </style:style>
    <style:style style:name="T6" style:family="text">
      <style:text-properties officeooo:rsid="0021c943"/>
    </style:style>
    <style:style style:name="T7" style:family="text">
      <style:text-properties officeooo:rsid="002323e9"/>
    </style:style>
    <style:style style:name="T8" style:family="text">
      <style:text-properties officeooo:rsid="00267bd6"/>
    </style:style>
    <style:style style:name="T9" style:family="text">
      <style:text-properties officeooo:rsid="0027d771"/>
    </style:style>
    <style:style style:name="T10" style:family="text">
      <style:text-properties officeooo:rsid="002b0c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frame draw:style-name="fr1" draw:name="Image1 Copy 1" text:anchor-type="char" svg:x="0.0161in" svg:y="-0.1043in" svg:width="0.7453in" svg:height="0.7453in" draw:z-index="0"><draw:image xlink:href="Pictures/10000001000001000000010027455109.png" xlink:type="simple" xlink:show="embed" xlink:actuate="onLoad" draw:mime-type="image/png"/></draw:frame>ΠΑΝΕΠΙΣΤΗΜΙΟ ΔΥΤΙΚΗΣ ΑΤΤΙΚΗΣ</text:p>
      <text:p text:style-name="P3">ΣΧΟΛΗ ΜΗΧΑΝΙΚΩΝ</text:p>
      <text:p text:style-name="P4">ΤΜΗΜΑ ΜΗΧΑΝΙΚΩΝ ΠΛΗΡΟΦΟΡΙΚΗΣ ΚΑΙ ΥΠΟΛΟΓΙΣΤΩΝ<text:line-break/></text:p>
      <text:p text:style-name="P5"><draw:frame draw:style-name="fr2" draw:name="Frame1" text:anchor-type="as-char" draw:z-index="2"><draw:text-box fo:min-height="0.0161in" fo:min-width="0.0161in"><text:h text:style-name="P6" text:outline-level="1">Διπλωματική Εργασία</text:h></draw:text-box></draw:frame><text:line-break/><text:span text:style-name="T1">Σύστημα Διαχείρισης Έξυπνων Καροτσιών με χρήση Μικροϋπηρεσιών και Εικονικοποίησης βασισμένης σε Περιέκτες</text:span></text:p>
      <text:p text:style-name="P2"/>
      <text:p text:style-name="P2"/>
      <text:p text:style-name="P2"/>
      <text:p text:style-name="P2"/>
      <text:p text:style-name="P2">Συγγραφέας: Ιωάννης Ταρναράς</text:p>
      <text:p text:style-name="P2">Αριθμός Μητρώου: 18390290</text:p>
      <text:p text:style-name="P2"/>
      <text:p text:style-name="P2"/>
      <text:p text:style-name="P2"/>
      <text:p text:style-name="P2"/>
      <text:p text:style-name="P2">Επιβλέπων Καθηγητής: Βασίλειος Μάμαλης</text:p>
      <text:p text:style-name="P2">Συν-επιβλέπων: Απόστολος Αναγνωστόπουλος</text:p>
      <text:p text:style-name="P7"><draw:frame draw:style-name="fr1" draw:name="Image1 Copy 1 Copy 1" text:anchor-type="char" svg:x="0.0161in" svg:y="-0.1043in" svg:width="0.7453in" svg:height="0.7453in" draw:z-index="1"><draw:image xlink:href="Pictures/10000001000001000000010027455109.png" xlink:type="simple" xlink:show="embed" xlink:actuate="onLoad" draw:mime-type="image/png"/></draw:frame>UNIVERSITY OF WEST ATTICA</text:p>
      <text:p text:style-name="P3">FACULTY OF ENGINEERING</text:p>
      <text:p text:style-name="P4">DEPARTMENT OF INFORMATICS AND COMPUTER ENGINEERING</text:p>
      <text:h text:style-name="P8" text:outline-level="1">Diploma Thesis<text:line-break/>Smart Cart Management System using Microservices and Container-based Virtualization</text:h>
      <text:p text:style-name="P9"/>
      <text:p text:style-name="P10">Author: Ioannis Tarnaras</text:p>
      <text:p text:style-name="P10">Registration Number: 18392090</text:p>
      <text:p text:style-name="P10"/>
      <text:p text:style-name="P10"/>
      <text:p text:style-name="P10"/>
      <text:p text:style-name="P10">Supervisor: Vasileios Mamalis</text:p>
      <text:p text:style-name="P10">Co-Supervisor: Apostolos Anagnostopoulos</text:p>
      <text:h text:style-name="P11" text:outline-level="1">Διπλωματική Εργασία<text:line-break/>Σύστημα Διαχείρισης Έξυπνων Καροτσιών με χρήση Μικροϋπηρεσιών και Εικονικοποίησης βασισμένης σε Περιέκτες</text:h>
      <text:p text:style-name="P12"/>
      <text:p text:style-name="P13">Συγγραφέας: Ιωάννης Ταρναράς</text:p>
      <text:p text:style-name="P13">Αριθμός Μητρώου: 18390290</text:p>
      <text:p text:style-name="P13"/>
      <text:p text:style-name="P13"/>
      <text:p text:style-name="P13">Επιβλέπων Καθηγητής: Βασίλειος Μάμαλης</text:p>
      <text:p text:style-name="P13">Συν-επιβλέπων: Απόστολος Αναγνωστόπουλος</text:p>
      <text:p text:style-name="P13"/>
      <text:p text:style-name="P14">Η διπλωματικη εξεταστηκε απο...</text:p>
      <text:p text:style-name="P15"/>
      <text:h text:style-name="P16" text:outline-level="1"><text:bookmark-start text:name="__RefHeading___Toc15_2569290042"/>Περίληψη<text:bookmark-end text:name="__RefHeading___Toc15_2569290042"/></text:h>
      <text:p text:style-name="Standard">Αντικείμενο της παρούσας διπλωματικής εργασίας είναι η μελέτη και η ανάπτυξη ενός έξυπνου καροτσιού (Smart Cart), με στόχο τη βελτίωση της αγοραστικής εμπειρίας του καταναλωτή εντός του καταστήματος. Το καρότσι είναι εξοπλισμένο με μια πληθώρα αισθητήρων, όπως NFC/RFID, υπερηχητικούς αισθητήρες απόστασης (ultrasound distance sensors), ζυγαριές ακριβείας, κάμερες τεχνητής νοημοσύνης (AI cameras), αισθητήρες φωτός, καθώς και αισθητήρες υπερ-ευρείας ζώνης (Ultra-Wideband - UWB).</text:p>
      <text:p text:style-name="Standard">Αρχικά, μελετώνται οι απαιτήσεις του συστήματος, εστιάζοντας τόσο στις προσωπικές προτιμήσεις και την ασφάλεια των προϊόντων του καταναλωτή, όσο και στην προστασία των συμφερόντων του καταστήματος. Στη συνέχεια, υλοποιείται μια αρχιτεκτονική βασισμένη σε μικροϋπηρεσίες (microservices) με τη χρήση Docker Swarm, για την αποτελεσματική υποστήριξη των λειτουργιών του συστήματος. Επιπλέον, πραγματοποιούνται προσομοιώσεις δεδομένων αισθητήρων σε πραγματικό χρόνο, ώστε να επαληθευτεί η ακρίβεια και η αξιοπιστία της εφαρμογής.</text:p>
      <text:p text:style-name="Standard">Για τη διαχείριση των μικροϋπηρεσιών χρησιμοποιείται το Docker Swarm, εγκατεστημένο σε περιβάλλον Server με λειτουργικό σύστημα Alpine Linux. Οι κύριες υπηρεσίες περιλαμβάνουν:</text:p>
      <text:p text:style-name="Standard"><text:span text:style-name="T2">MariaDB:</text:span> Υπεύθυνη για τη διαχείριση των δεδομένων των προϊόντων, των χρηστών και της κατάστασης των καροτσιών (ID, ενεργή κατάσταση, τρέχων χρήστης).</text:p>
      <text:p text:style-name="Standard"><text:span text:style-name="T2">InfluxDB:</text:span> Βάση δεδομένων χρονοσειρών για την αποθήκευση και ανάλυση των δεδομένων από τους αισθητήρες.</text:p>
      <text:p text:style-name="Standard"><text:span text:style-name="T2">MQTT (Eclipse Mosquitto):</text:span> Πρωτόκολλο για τη συλλογή δεδομένων, τα οποία προωθούνται μέσω ενός Telegraf client στην InfluxDB.</text:p>
      <text:p text:style-name="Standard">Η ανάπτυξη του backend πραγματοποιήθηκε στη γλώσσα προγραμματισμού Golang, διασφαλίζοντας υψηλές επιδόσεις και επεκτασιμότητα. Ο χρήστης αλληλεπιδρά με το σύστημα μέσω μιας οθόνης αφής, η οποία διαθέτει γραφικό περιβάλλον (UI) αναπτυγμένο με Vue.js και Vite για μέγιστη ταχύτητα και δυναμική πλοήγηση. Οι δυνατότητες της εφαρμογής περιλαμβάνουν την παρακολούθηση προσφορών, τον έλεγχο αποθεμάτων σε πραγματικό χρόνο, καθώς και έναν διαδραστικό χάρτη του καταστήματος για τη διευκόλυνση της εύρεσης προϊόντων.</text:p>
      <text:p text:style-name="Standard"><text:span text:style-name="T2">Λέξεις-κλειδιά:</text:span> Έξυπνο καρότσι (Smart Cart), Μικροϋπηρεσίες, Docker Swarm, Golang, MQTT, InfluxDB, Αισθητήρες, IoT, Vue.js, Smart Retail.</text:p>
      <text:p text:style-name="Standard"/>
      <text:h text:style-name="P17" text:outline-level="1"><text:bookmark-start text:name="__RefHeading___Toc17_2569290042"/>Abstract<text:bookmark-end text:name="__RefHeading___Toc17_2569290042"/></text:h>
      <text:p text:style-name="Standard">The subject of this diploma thesis is the study and development of a Smart Cart, aimed at enhancing the consumer's shopping experience within a retail environment. The cart is equipped with an array of sensors, including NFC/RFID, ultrasonic distance sensors, precision scales, AI-powered cameras, light sensors, and Ultra-Wideband (UWB) sensors.</text:p>
      <text:p text:style-name="Standard">Initially, the system requirements are analyzed, focusing on personalized consumer preferences and cart security, as well as the protection of the store's interests. Subsequently, a microservices-based architecture is implemented using Docker Swarm to efficiently support both the consumer and the store operations. Finally, real-time simulations of sensor data are conducted to verify the accuracy and effectiveness of the system.</text:p>
      <text:p text:style-name="Standard">The microservices orchestration is managed by Docker Swarm, deployed on a server running Alpine Linux. The core services include:</text:p>
      <text:p text:style-name="Standard"><text:span text:style-name="T2">MariaDB:</text:span> Responsible for product registries, user accounts, and cart metadata (Cart ID, active status, and current operator).</text:p>
      <text:p text:style-name="Standard"><text:span text:style-name="T2">InfluxDB:</text:span> Utilized for storing time-series sensor data, which is essential for movement analysis and decision-making.</text:p>
      <text:p text:style-name="Standard"><text:span text:style-name="T2">MQTT (Eclipse Mosquitto):</text:span> Facilitates data collection from the sensors, which is then forwarded to InfluxDB via a Telegraf client.</text:p>
      <text:p text:style-name="Standard">The backend application is developed using the Golang programming language, chosen for its high performance and concurrency capabilities, ensuring a seamless user experience. The consumer interacts with the system via a touch interface featuring a GUI built with Vue.js and Vite for fast and reactive navigation. Key features include real-time promotion tracking, stock availability alerts, and an interactive supermarket map for optimized product location.</text:p>
      <text:p text:style-name="Standard"><text:span text:style-name="T2">Keywords:</text:span> Smart Cart, Microservices, Docker Swarm, Golang, MQTT, InfluxDB, Sensors, IoT, Vue.js, Smart Retail.</text:p>
      <text:p text:style-name="P18"/>
      <text:table-of-content text:style-name="Sect1" text:protected="true" text:name="Table of Contents1">
        <text:table-of-content-source text:outline-level="10">
          <text:index-title-template text:style-name="Contents_20_Heading">Ενότητε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Ενότητες</text:p>
          </text:index-title>
          <text:p text:style-name="P20"><text:a xlink:type="simple" xlink:href="#__RefHeading___Toc15_2569290042" text:style-name="Index_20_Link" text:visited-style-name="Index_20_Link">Περίληψη<text:tab/>4</text:a></text:p>
          <text:p text:style-name="P20"><text:a xlink:type="simple" xlink:href="#__RefHeading___Toc17_2569290042" text:style-name="Index_20_Link" text:visited-style-name="Index_20_Link">Abstract<text:tab/>5</text:a></text:p>
        </text:index-body>
      </text:table-of-content>
      <text:p text:style-name="P18"/>
      <text:p text:style-name="P21">Κεφάλαιο 1: Είσαγωγή</text:p>
      <text:p text:style-name="P22">Η αγορά προιόντων σε σούπερμαρκετ είναι μία <text:span text:style-name="T3">μη απαιτητική, χρονοβόρα διαδικασία για την εξασφάλιση πρώτων υλών αλλά και αναγκών που διαφέρει από νοικοκυριό σε νοικοκυριό. Για την απομνημόνευση των προιόντων ο καταναλωτής με την βοήθεια χαρτιού δημιουργεί μία λίστα με αναγκαία προιόντα που χρειάζεται να αγοραστούν για την επιβίωση του και για την ικανοποίηση της ανάγκης του. Στην σύγχρονη επόχη οι τιμές των προιόντων διαφέρουν </text:span><text:span text:style-name="T4">από εταιρία σε εταιρία</text:span><text:span text:style-name="T3">. </text:span><text:span text:style-name="T4">Όπως και οι ελλήψεις </text:span><text:span text:style-name="T5">αλλά και οι εύρεση </text:span><text:span text:style-name="T4">των προιόντων </text:span><text:span text:style-name="T5">αναλλογούν ανά </text:span><text:span text:style-name="T4">σουπερμάρκετ. Μ</text:span><text:span text:style-name="T5">ε την βοήθεια της τεχνολογίας και τον μικρο-υπηρεσιών εξαλλείφεται ο χρόνος αναζήτησης των προιόντων και οι τιμές τους καθώς και ενισχύεται η ασφάλεια του ίδιου του κατάστηματος. Η καταγραφή το προιόντων και η ανάλυση των στατιστικών </text:span><text:span text:style-name="T6">από τις αγορές των καταναλωτών </text:span><text:span text:style-name="T5">επιτυγχάνεται στιγμιαία. <text:line-break/></text:span><text:span text:style-name="T7">Οι μικρο-υπηρεσίες παρέχουν την σύγχρονη λύση στις μοντέρνες εφαρμογές. Αποτελούνται από αυτόνομες και ανεξάρτητες μονάδες λογισμικού, η καθεμία είναι υπεύθυνη για μία συγκεκριμένη επιχειρησιακή λειτουργία. Η επικοινωνία μεταξύ τους επιτυγχάνεται μέσω ελαφρών πρωτοκόλλων, με αποτέλεσμα την ευέλικτη κλιμάκωση μεταξύ τους καθώς και την εύκολη συντήρηση ολόκληρου του συστήματος. Το σπουδαιότερο των μικρο-υπηρεσιών είναι ότι οι υπηρεσίες μπορούν να αναπτυχθούν είτε εξαρτημένα είτε ανεξάρτητα μεταξύ τους. </text:span></text:p>
      <text:p text:style-name="P22">Παρόλα αυτά, λόγω της πολυπλοκότητας και την <text:span text:style-name="T8">συνθετικότητας της κάθε </text:span>υπηρεσίας, <text:span text:style-name="T8">η τροποποίηση και αναδιαμόρφωση των μικρο-υπηρεσιών σε επηχειρησιακό πλαίσιο αποτελεί μία από τις κυριότερες προκλήσεις </text:span><text:span text:style-name="T9">σε τέτοια είδη εφαρμογών. Απαιτεί εξειδικευμένες γνώσεις κατά την τροποποίηση τους αλλά και αποτελεσματικές ενέργειες για επίλυση τυχών δυσλειτουργιών ή και αλλαγών. </text:span><text:span text:style-name="T10">Οι τακτικές αναβαθμίσεις των συστήματων είναι αναγκαία για την ενίσχυση προστασίας και μείωση κινδύνου hacking. </text:span></text:p>
      <text:h text:style-name="P23" text:outline-level="1">Περιγραφή των μικρουπηρεσιών που χρησιμοποιήθηκαν</text:h>
      <text:p text:style-name="P24">MariaDB</text:p>
      <text:p text:style-name="P25">Η MariaDB δημιουργήθηκε το 2009 από τον Michal “Monty” Widenius, τον δημιουργό της MySQL. Είναι μία από τις πιο δημοφιλή συστήματα διαχείρισης σχεσιακών βάσεων δεδομένων (RDBMS). Στην αρχή της δημιουργίας του αναπτύχθηκε ως “fork” της MySQ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in" style:contextual-spacing="false" fo:line-height="115%" fo:text-align="justify" style:justify-single-word="false"/>
      <style:text-properties style:font-name="Times New Roman1" fo:font-family="'Times New Roman'" style:font-style-name="Regular" style:font-family-generic="roman"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4201in" fo:margin-bottom="0.4201in" style:contextual-spacing="false" style:page-number="auto" fo:break-before="page"/>
      <style:text-properties style:font-name="Times New Roman" fo:font-family="'Times New Roman'" style:font-style-name="Bold" style:font-family-generic="roman" style:font-pitch="variable" fo:font-size="14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 fo:font-family="'Times New Roman'" style:font-style-name="Bold" style:font-family-generic="roman" style:font-pitch="variable" fo:font-size="12pt" fo:font-weight="bold" style:font-size-asian="16pt" style:font-weight-asian="bold" style:font-size-complex="16pt" style:font-weight-complex="60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5c2ca" officeooo:paragraph-rsid="0005c2c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bookmark text:name="PageNumWizard_FOOTER_Default Page Style4"/></text:p>
        <text:p text:style-name="Footer"><text:tab/></text:p>
      </style:footer>
    </style:master-page>
    <style:master-page style:name="First_20_Page" style:display-name="First Page" style:page-layout-name="Mpm2" draw:style-name="Mdp1" style:next-style-name="Standard"/>
    <style:master-page style:name="Envelope" style:page-layout-name="Mpm3" draw:style-name="Mdp1"/>
    <style:master-page style:name="Endnote"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Index" style:page-layout-name="Mpm2" draw:style-name="Mdp1"/>
    <style:master-page style:name="HTML" style:page-layout-name="Mpm7" draw:style-name="Mdp1"/>
    <style:master-page style:name="Footnote" style:page-layout-name="Mpm4"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6:09:57.269157906</meta:creation-date>
    <dc:date>2026-04-30T00:02:45.966064796</dc:date>
    <meta:editing-duration>PT2H8M6S</meta:editing-duration>
    <meta:editing-cycles>19</meta:editing-cycles>
    <meta:generator>LibreOffice/25.2.3.2$Linux_X86_64 LibreOffice_project/520$Build-2</meta:generator>
    <meta:document-statistic meta:table-count="0" meta:image-count="2" meta:object-count="0" meta:page-count="10" meta:paragraph-count="51" meta:word-count="951" meta:character-count="7169" meta:non-whitespace-character-count="6261"/>
  </office:meta>
</office:document-meta>
</file>